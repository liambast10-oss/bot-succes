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scord.py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5T01:00:49.306000000</meta:creation-date>
    <dc:date>2026-05-25T01:01:04.020000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0"/>
    <meta:generator>LibreOffice/24.8.0.3$Windows_X86_64 LibreOffice_project/0bdf1299c94fe897b119f97f3c613e9dca6be583</meta:generator>
  </office:meta>
</office:document-meta>
</file>